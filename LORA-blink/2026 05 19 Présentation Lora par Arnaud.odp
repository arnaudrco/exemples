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A00000140EEB6B826.png" manifest:media-type="image/png"/>
  <manifest:file-entry manifest:full-path="Pictures/100000000000041A000001487F5728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10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>
      <style:graphic-properties draw:stroke="none" draw:fill="non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1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1.026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start"/>
    </style:style>
    <style:style style:name="P3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0pt" style:font-size-complex="10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9.5cm" svg:height="1.026cm" svg:x="9cm" svg:y="0.987cm" presentation:class="title" presentation:user-transformed="true">
          <draw:text-box>
            <text:p><text:span text:style-name="T1">LoRa</text:span></text:p>
          </draw:text-box>
        </draw:frame>
        <draw:frame draw:style-name="gr1" draw:text-style-name="P1" draw:layer="layout" svg:width="8cm" svg:height="2.5cm" svg:x="0.5cm" svg:y="0.5cm">
          <draw:image xlink:href="Pictures/100000000000041A000001487F57285F.png" xlink:type="simple" xlink:show="embed" xlink:actuate="onLoad" draw:mime-type="image/png">
            <text:p/>
          </draw:image>
        </draw:frame>
        <draw:frame draw:style-name="gr2" draw:text-style-name="P3" draw:layer="layout" svg:width="26.661cm" svg:height="1.361cm" svg:x="0.839cm" svg:y="4cm">
          <draw:text-box>
            <text:p text:style-name="P2"><text:span text:style-name="T2">Présentation et discussion sur la radio LORA, le réseau MESHSTATIC, reticulum, et un nouveau thème sur la construction d'un poste autonome frugal en énergie : Jean Pierre Vitton a réalisé un poste à partir d'un raspberry pi !</text:span></text:p>
          </draw:text-box>
        </draw:frame>
        <draw:frame draw:style-name="gr3" draw:text-style-name="P5" draw:layer="layout" svg:width="9cm" svg:height="1.55cm" svg:x="9.5cm" svg:y="2.013cm">
          <draw:text-box>
            <text:p text:style-name="P4">Présentation d’Arnaud<text:line-break/><text:span text:style-name="T3">Mardi 19 mai 2026 à 18H30</text:span></text:p>
          </draw:text-box>
        </draw:frame>
        <draw:frame draw:style-name="gr1" draw:text-style-name="P1" draw:layer="layout" svg:width="3.688cm" svg:height="2.49cm" svg:x="20.312cm" svg:y="1cm">
          <draw:image xlink:href="Pictures/10000000000001DA00000140EEB6B826.png" xlink:type="simple" xlink:show="embed" xlink:actuate="onLoad" draw:mime-type="image/png">
            <text:p/>
          </draw:image>
        </draw:frame>
        <draw:frame draw:style-name="gr4" draw:text-style-name="P6" draw:layer="layout" svg:width="2.5cm" svg:height="1cm" svg:x="1cm" svg:y="6cm">
          <draw:text-box>
            <text:p>LoRa</text:p>
          </draw:text-box>
        </draw:frame>
        <draw:frame draw:style-name="gr5" draw:text-style-name="P8" draw:layer="layout" svg:width="14.5cm" svg:height="1.5cm" svg:x="3.5cm" svg:y="6cm">
          <draw:text-box>
            <text:p text:style-name="P7"><text:span text:style-name="T2">Couche "</text:span><text:span text:style-name="T3">radio</text:span><text:span text:style-name="T2">" indispensable ; essais à faire en 868 et 433 MHz avec 4 modes de communication</text:span></text:p>
          </draw:text-box>
        </draw:frame>
        <draw:frame draw:style-name="gr4" draw:text-style-name="P8" draw:layer="layout" svg:width="10cm" svg:height="1cm" svg:x="17.5cm" svg:y="6cm">
          <draw:text-box>
            <text:p text:style-name="P7"><text:span text:style-name="T4"><text:a xlink:href="https://github.com/arnaudrco/exemples/wiki/LORA" xlink:type="simple">https://github.com/arnaudrco/exemples/wiki/LORA</text:a></text:span></text:p>
          </draw:text-box>
        </draw:frame>
        <draw:frame draw:style-name="gr6" draw:text-style-name="P9" draw:layer="layout" svg:width="9.837cm" svg:height="1.144cm" svg:x="17.5cm" svg:y="8.856cm">
          <draw:text-box>
            <text:p text:style-name="P7"><text:span text:style-name="T4"><text:a xlink:href="https://github.com/arnaudrco/exemples/wiki/LORA-reticulum" xlink:type="simple">https://github.com/arnaudrco/exemples/wiki/LORA-reticulum</text:a></text:span></text:p>
          </draw:text-box>
        </draw:frame>
        <draw:frame draw:style-name="gr7" draw:text-style-name="P6" draw:layer="layout" svg:width="2.5cm" svg:height="1.673cm" svg:x="1cm" svg:y="7.5cm">
          <draw:text-box>
            <text:p>MESH</text:p>
          </draw:text-box>
        </draw:frame>
        <draw:frame draw:style-name="gr8" draw:text-style-name="P6" draw:layer="layout" svg:width="13.5cm" svg:height="1.384cm" svg:x="3.5cm" svg:y="7.5cm">
          <draw:text-box>
            <text:p><text:span text:style-name="T2">Produits mondialement reconnus,pas de recherche associée : il faut rester sur les réglages </text:span></text:p>
          </draw:text-box>
        </draw:frame>
        <draw:frame draw:style-name="gr4" draw:text-style-name="P6" draw:layer="layout" svg:width="4.5cm" svg:height="1cm" svg:x="1cm" svg:y="9cm">
          <draw:text-box>
            <text:p>RETICULUM</text:p>
          </draw:text-box>
        </draw:frame>
        <draw:frame draw:style-name="gr5" draw:text-style-name="P6" draw:layer="layout" svg:width="12cm" svg:height="1.5cm" svg:x="5.5cm" svg:y="9cm">
          <draw:text-box>
            <text:p><text:span text:style-name="T2">Complexe, repose sur un inventeur principalement multibande, prometteur</text:span></text:p>
          </draw:text-box>
        </draw:frame>
        <draw:frame draw:style-name="gr9" draw:text-style-name="P6" draw:layer="layout" svg:width="12.5cm" svg:height="1cm" svg:x="4.217cm" svg:y="10.702cm">
          <draw:text-box>
            <text:p><text:span text:style-name="T2">Pi maîtrisé </text:span><text:span text:style-name="T5">grâce</text:span><text:span text:style-name="T2"> à Jean-Pierre ; nrf52480 prometteur</text:span></text:p>
          </draw:text-box>
        </draw:frame>
        <draw:frame draw:style-name="gr4" draw:text-style-name="P6" draw:layer="layout" svg:width="3.5cm" svg:height="1cm" svg:x="1cm" svg:y="10.5cm">
          <draw:text-box>
            <text:p>FRUGAL</text:p>
          </draw:text-box>
        </draw:frame>
        <draw:frame draw:style-name="gr4" draw:text-style-name="P8" draw:layer="layout" svg:width="10cm" svg:height="1cm" svg:x="17.5cm" svg:y="10.5cm">
          <draw:text-box>
            <text:p text:style-name="P10"><text:span text:style-name="T2"><text:a xlink:href="https://github.com/arnaudrco/exemples/wiki/LORA-frugal" xlink:type="simple">https://github.com/arnaudrco/exemples/wiki/LORA-frugal</text:a></text:span></text:p>
          </draw:text-box>
        </draw:frame>
        <draw:frame draw:style-name="gr10" draw:text-style-name="P8" draw:layer="layout" svg:width="9cm" svg:height="1.361cm" svg:x="17.5cm" svg:y="7.5cm">
          <draw:text-box>
            <text:p text:style-name="P10"><text:span text:style-name="T6"><text:a xlink:href="https://github.com/arnaudrco/exemples/wiki/LORA-pour-les-pros" xlink:type="simple">https://github.com/arnaudrco/exemples/wiki/LORA-pour-les-pros</text:a></text:span><text:span text:style-name="T6"> </text:span></text:p>
          </draw:text-box>
        </draw:frame>
        <presentation:notes draw:style-name="dp2">
          <draw:page-thumbnail draw:style-name="gr11" draw:layer="layout" svg:width="17cm" svg:height="9.56cm" svg:x="2cm" svg:y="2.5cm" draw:page-number="1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1" draw:layer="layout" svg:width="17cm" svg:height="9.56cm" svg:x="2cm" svg:y="2.5cm" draw:page-number="2" presentation:class="page"/>
          <draw:frame presentation:style-name="pr5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16:14:39.650039498</meta:creation-date>
    <meta:editing-duration>PT26M55S</meta:editing-duration>
    <meta:editing-cycles>8</meta:editing-cycles>
    <meta:generator>LibreOffice/24.2.7.2$Linux_X86_64 LibreOffice_project/420$Build-2</meta:generator>
    <dc:title>Blue Curve</dc:title>
    <dc:date>2026-05-19T17:57:13.722569013</dc:date>
    <meta:document-statistic meta:object-count="58"/>
  </office:meta>
</office:document-meta>
</file>